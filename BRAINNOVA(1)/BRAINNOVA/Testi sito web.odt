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dc0d7"/>
    </style:style>
    <style:style style:name="T1" style:family="text">
      <style:text-properties officeooo:rsid="000dc0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HOME PAGE </text:p>
      <text:p text:style-name="Standard">---------------------------------------------------------------------------------------------------</text:p>
      <text:p text:style-name="Standard"/>
      <text:p text:style-name="Standard"/>
      <text:p text:style-name="Standard">Fondazione Bra Innova <text:s/>per stimolare e sostenere l'innovazione didattica <text:s/>nelle scuole secondarie superiori </text:p>
      <text:p text:style-name="Standard"/>
      <text:p text:style-name="Standard">&gt; Scopri la Fondazione</text:p>
      <text:p text:style-name="Standard"/>
      <text:p text:style-name="Standard"/>
      <text:p text:style-name="Standard">-----</text:p>
      <text:p text:style-name="Standard"/>
      <text:p text:style-name="Standard"/>
      <text:p text:style-name="Standard">Margherita Testa: Educare, innovare, lasciare un segno</text:p>
      <text:p text:style-name="Standard"/>
      <text:p text:style-name="Standard">Docente, dirigente scolastica e promotrice culturale, Margherita Testa ha dedicato il proprio percorso professionale ed umano alla formazione delle nuove generazioni, all’innovazione didattica e alla diffusione di una cultura aperta, inclusiva e profondamente legata al territorio.</text:p>
      <text:p text:style-name="Standard">&gt; Margherita Testa</text:p>
      <text:p text:style-name="Standard"/>
      <text:p text:style-name="Standard"/>
      <text:p text:style-name="Standard">------</text:p>
      <text:p text:style-name="Standard"/>
      <text:p text:style-name="Standard">Governance</text:p>
      <text:p text:style-name="Standard">Persone, esperienze, territorio</text:p>
      <text:p text:style-name="Standard"/>
      <text:p text:style-name="Standard">La Fondazione Testa-Russo BRA INNOVA nasce dalla collaborazione tra scuola, istituzioni, imprese e comunità locale. Un Consiglio Direttivo composto da figure provenienti dal mondo educativo, culturale e sociale accompagna la Fondazione nelle sue attività, con l’obiettivo di sostenere una scuola capace di innovare, coinvolgere e valorizzare i giovani.</text:p>
      <text:p text:style-name="Standard">&gt; Scopri</text:p>
      <text:p text:style-name="Standard"/>
      <text:p text:style-name="Standard"/>
      <text:p text:style-name="Standard">Modalità d’intervento</text:p>
      <text:p text:style-name="Standard">Idee, progetti, valorizzazione</text:p>
      <text:p text:style-name="Standard"/>
      <text:p text:style-name="Standard">Attraverso bandi annuali, iniziative dedicate e collaborazioni con le scuole del territorio, la Fondazione sostiene progetti didattici innovativi basati su partecipazione, creatività e apprendimento cooperativo. Un percorso pensato per favorire nuove esperienze formative e creare un dialogo concreto tra scuola, cultura e territorio.</text:p>
      <text:p text:style-name="Standard">&gt; Scopri</text:p>
      <text:p text:style-name="Standard"/>
      <text:p text:style-name="Standard"/>
      <text:p text:style-name="Standard">-----</text:p>
      <text:p text:style-name="Standard"/>
      <text:p text:style-name="Standard">Sostieni la Fondazione</text:p>
      <text:p text:style-name="Standard">Ogni contributo aiuta a trasformare idee e talenti in esperienze formative capaci di lasciare un segno nelle nuove generazioni.</text:p>
      <text:p text:style-name="Standard">&gt; Sostieni</text:p>
      <text:p text:style-name="Standard"/>
      <text:p text:style-name="Standard"/>
      <text:p text:style-name="Standard"><text:soft-page-break/>-----</text:p>
      <text:p text:style-name="Standard"/>
      <text:p text:style-name="Standard">Download</text:p>
      <text:p text:style-name="Standard"/>
      <text:p text:style-name="P1">Atto Costitutivo della Fondazione</text:p>
      <text:p text:style-name="P1">Statuto della Fondazione</text:p>
      <text:p text:style-name="P1">Bilancio Sociale</text:p>
      <text:p text:style-name="P1"><text:span text:style-name="T1">Bilancio </text:span>Patrimoniale</text:p>
      <text:p text:style-name="P1">Bando Annuale della Fondazione</text:p>
      <text:p text:style-name="P1">Scheda di Presentazione Progetto — Ex Ante</text:p>
      <text:p text:style-name="P1">Scheda di Rendicontazione Progetto — Ex Post</text:p>
      <text:p text:style-name="P1">Documentazione informativa</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MARGHERITA TESTA </text:p>
      <text:p text:style-name="Standard">---------------------------------------------------------------------------------------------------</text:p>
      <text:p text:style-name="Standard"/>
      <text:p text:style-name="Standard">Energica, vivace, colta, impegnata nel sociale e con mille interessi ha contribuito all'innovazione didattica nelle scuole in cui ha lavorato, anche con la promozione dei "laboratori scolastici"</text:p>
      <text:p text:style-name="Standard"/>
      <text:p text:style-name="Standard"/>
      <text:p text:style-name="Standard"/>
      <text:p text:style-name="Standard">Margherita Testa si è laureata in lettere classiche e specializzata in psicopedagogia presso l'Università degli Studi di Torino. È stata docente di lettere e dirigente scolastica nelle scuole secondarie superiori piemontesi. Ispirata da Piaget e dalle teorie sulle intelligenze multiple di Gardner e di Zanieri, secondo la quale ogni uomo è dotato di molte forme di intelligenza combinate fra loro e a diversi livelli, <text:s/>si è molto impegnata nel far scoprire ai giovani le <text:s/>forme di intelligenza a loro più congeniali.</text:p>
      <text:p text:style-name="Standard"/>
      <text:p text:style-name="Standard">Energica, vivace, colta, impegnata nel sociale e con mille interessi ha contribuito all'innovazione didattica nelle scuole in cui ha lavorato, anche con la promozione di "laboratori scolastici" (teatrale, coreutico, musicale, ecc.). Sorpresa per l'assenza dei concetti base dell'economia nell'educazione offerta agli alunni più giovani, per sopperire alla mancanza di testi adatti, ha scritto il testo intitolato "Il denaro di Pinocchio e il nostro - Sussidiario di economia per insegnanti coraggiosi e alunni curiosi".</text:p>
      <text:p text:style-name="Standard"/>
      <text:p text:style-name="Standard">A Bra ha fondato, insieme all'ARCI, una delle prime Università della Terza Età nate in Italia. Dal 2001 al 2011 ha ricoperto il ruolo di Giudice presso il Tribunale di Torino, Corte d'Appello Sezione Minori.Nel 2020, quando era presidente del Rotary Club di Bra, ha promosso, con la sponsorizzazione del Comune, il progetto del “Bosco del Rotary”. <text:s/>Così a Bra in strada Falchetto, su un terreno non utilizzato di circa mq. 3900, è sorto un boschetto urbano con oltre 100 piante .</text:p>
      <text:p text:style-name="Standard"/>
      <text:p text:style-name="Standard">DOWNLOAD ARTICOLO</text:p>
      <text:p text:style-name="Standard"/>
      <text:p text:style-name="Standard">-----</text:p>
      <text:p text:style-name="Standard"/>
      <text:p text:style-name="Standard">La vita è un palcoscenico:Il teatro come esperienza educativa.</text:p>
      <text:p text:style-name="Standard"/>
      <text:p text:style-name="Standard">Ritornata nella sua scuola, il Liceo Classico Gandino di Bra come Dirigente, dopo essere stata studentessa negli anni ottanta, Margherita Testa, conosceva quindi molto bene il senso profondo della cultura classica, le tradizioni, i programmi ecc.Questi imponevano agli studenti dell’ultima classe la traduzione e lo studio di una tragedia greca da presentare all’esame, durante il colloquio.Nell’anno scolastico 1989/90 la classe propose alla Dirigente di metterla anche in scena <text:s/>nel Teatro greco di Siracusa.Era infatti già <text:s/>attivo allora l’Istituto del Dramma Antico che organizzava (ed organizza ancora) gli spettacoli <text:s/>del Teatro greco di Siracusa ed offriva a qualche classe (ben selezionata) di recitare gratuitamente presso lo storico teatro.Margherita, per assecondare gli studenti, in poco tempo trovò i finanziamenti necessari per il volo a Siracusa, per la rappresentazione, per l’alloggio degli studenti e per coprire tutte le altre spese necessarie alla recita.Questo evento segnò, in provincia di Cuneo, la nascita del teatro scolastico che presto si diffuse in molte altre scuole</text:p>
      <text:p text:style-name="Standard"/>
      <text:p text:style-name="Standard">DOWNLOAD TESTO LA VITA è UN PALCOSCENICO</text:p>
      <text:p text:style-name="Standard"/>
      <text:p text:style-name="Standard">-----</text:p>
      <text:p text:style-name="Standard"/>
      <text:p text:style-name="Standard"><text:soft-page-break/>La parola agli ex alunni</text:p>
      <text:p text:style-name="Standard">Ricordi, esperienze e testimonianze di chi ha vissuto la scuola accanto a Margherita Testa. Racconti che restituiscono il ritratto di una dirigente scolastica capace di lasciare un segno profondo non solo attraverso l’insegnamento, ma soprattutto attraverso l’attenzione verso le persone, il dialogo, la cultura e la capacità di valorizzare ogni studente.</text:p>
      <text:p text:style-name="Standard"/>
      <text:p text:style-name="Standard">DOWNLOAD EX ALUNNI</text:p>
      <text:p text:style-name="Standard"/>
      <text:p text:style-name="Standard">-----</text:p>
      <text:p text:style-name="Standard"/>
      <text:p text:style-name="Standard">Sostieni la Fondazione</text:p>
      <text:p text:style-name="Standard">Ogni contributo aiuta a trasformare idee e talenti in esperienze formative capaci di lasciare un segno nelle nuove generazioni.</text:p>
      <text:p text:style-name="Standard">&gt; Sostie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LA FONDAZIONE</text:p>
      <text:p text:style-name="Standard">---------------------------------------------------------------------------------------------------</text:p>
      <text:p text:style-name="Standard"/>
      <text:p text:style-name="Standard">La Fondazione Testa-Russo BRA INNOVA nella Scuola Secondaria Superiore – ETS nasce con l’obiettivo di sostenere e promuovere l’innovazione didattica nelle scuole secondarie superiori cittadine, creando un ponte concreto tra scuola, cultura, territorio e nuove generazioni.</text:p>
      <text:p text:style-name="Standard"/>
      <text:p text:style-name="Standard">Promossa dal Comune di Bra, da ASCOM Bra e dalla famiglia Russo, la Fondazione vuole onorare la memoria di Margherita Testa Russo, docente e dirigente scolastica che per oltre quarant’anni ha dedicato il proprio impegno alla crescita culturale, educativa e umana dei giovani, contribuendo alla diffusione di nuove pratiche didattiche e iniziative culturali sul territorio.</text:p>
      <text:p text:style-name="Standard">La Fondazione nasce dalla convinzione che la scuola debba essere anche spazio di partecipazione, creatività, confronto e scoperta delle proprie attitudini. Per questo sostiene progetti che promuovono il coinvolgimento attivo degli studenti, il lavoro di gruppo, l’approccio laboratoriale e il dialogo con il mondo culturale, sociale e produttivo </text:p>
      <text:p text:style-name="Standard"/>
      <text:p text:style-name="Standard"/>
      <text:p text:style-name="Standard">DOWNLOAD ATTO COSTITUTIVO - DOWNLOAD ST<text:span text:style-name="T1">A</text:span>TUTO - LOGHI COMUNE E ASCOM</text:p>
      <text:p text:style-name="Standard"/>
      <text:p text:style-name="Standard">-----</text:p>
      <text:p text:style-name="Standard"/>
      <text:p text:style-name="Standard">Gli Obbiettivi della Fondazione</text:p>
      <text:p text:style-name="Standard">La Fondazione Testa-Russo BRA INNOVA opera per sostenere una scuola capace di evolversi, sperimentare e mettere realmente al centro gli studenti. Attraverso il dialogo con le scuole, il territorio e le realtà culturali e sociali, promuove progetti e iniziative che favoriscono partecipazione, innovazione didattica, crescita personale e sviluppo delle competenze delle nuove generazioni.</text:p>
      <text:p text:style-name="Standard"/>
      <text:p text:style-name="Standard">- Innovazione didattica</text:p>
      <text:p text:style-name="Standard">Promuovere progetti e percorsi educativi capaci di sperimentare nuove modalità di insegnamento e apprendimento, con l’obiettivo di rendere la scuola un ambiente più partecipativo, dinamico e vicino ai bisogni degli studenti.</text:p>
      <text:p text:style-name="Standard"/>
      <text:p text:style-name="Standard">- Coinvolgimento attivo degli studenti</text:p>
      <text:p text:style-name="Standard">Favorire la partecipazione diretta degli alunni attraverso attività che li rendano protagonisti del percorso formativo, stimolando responsabilità, iniziativa personale e consapevolezza.</text:p>
      <text:p text:style-name="Standard"/>
      <text:p text:style-name="Standard">- Approccio laboratoriale e apprendimento cooperativo</text:p>
      <text:p text:style-name="Standard">Sostenere esperienze didattiche basate sul lavoro di gruppo, sul confronto e sulla collaborazione tra studenti e docenti, valorizzando attività laboratoriali e progettuali.</text:p>
      <text:p text:style-name="Standard"/>
      <text:p text:style-name="Standard">- Dialogo con il territorio</text:p>
      <text:p text:style-name="Standard">Promuovere l’interazione tra scuola, realtà culturali, sociali e produttive del territorio per creare opportunità formative concrete e favorire la crescita delle competenze degli studenti.</text:p>
      <text:p text:style-name="Standard"/>
      <text:p text:style-name="Standard">- Condivisione delle buone pratiche educative</text:p>
      <text:p text:style-name="Standard">Incentivare lo scambio di esperienze tra insegnanti, studenti e istituti scolastici, favorendo la diffusione di metodologie didattiche innovative e strumenti utili alla documentazione delle attività svolte.</text:p>
      <text:p text:style-name="Standard"/>
      <text:p text:style-name="Standard">- Crescita della professionalità docente</text:p>
      <text:p text:style-name="Standard"><text:soft-page-break/>Contribuire alla formazione continua degli insegnanti attraverso il confronto con altre scuole, università, associazioni culturali e realtà del territorio.</text:p>
      <text:p text:style-name="Standard"/>
      <text:p text:style-name="Standard">- Sostegno ai progetti scolastici annuali</text:p>
      <text:p text:style-name="Standard">Finanziare iniziative e progetti didattici ritenuti coerenti con le finalità educative della Fondazione, sostenendo concretamente attività innovative nelle scuole secondarie superiori cittadine.</text:p>
      <text:p text:style-name="Standard"/>
      <text:p text:style-name="Standard">- Valorizzazione del merito e dei talenti</text:p>
      <text:p text:style-name="Standard">Premiare studenti meritevoli per profitto o distintisi in specifici ambiti culturali, educativi o progettuali, incentivando creatività, impegno e partecipazione.</text:p>
      <text:p text:style-name="Standard"/>
      <text:p text:style-name="Standard">-----</text:p>
      <text:p text:style-name="Standard"/>
      <text:p text:style-name="Standard">Sostieni la Fondazione</text:p>
      <text:p text:style-name="Standard">Ogni contributo aiuta a trasformare idee e talenti in esperienze formative capaci di lasciare un segno nelle nuove generazioni.</text:p>
      <text:p text:style-name="Standard">&gt; Sostie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GOVERNANCE</text:p>
      <text:p text:style-name="Standard">---------------------------------------------------------------------------------------------------</text:p>
      <text:p text:style-name="Standard"/>
      <text:p text:style-name="Standard">Una governance condivisa al servizio della scuola e del territorio.Riunisce professionalità, competenze ed esperienze differenti, accomunate dalla volontà di contribuire concretamente alla crescita culturale, educativa e sociale.</text:p>
      <text:p text:style-name="Standard"/>
      <text:p text:style-name="Standard">La Fondazione Testa-Russo BRA INNOVA nella Scuola Secondaria Superiore – ETS nasce dalla collaborazione tra istituzioni, scuola, realtà associative e famiglia fondatrice, con l’obiettivo di sostenere l’innovazione didattica e promuovere nuove opportunità formative dedicate agli studenti delle scuole secondarie superiori cittadine.</text:p>
      <text:p text:style-name="Standard"/>
      <text:p text:style-name="Standard">---</text:p>
      <text:p text:style-name="Standard"/>
      <text:p text:style-name="Standard">Il Consiglio Direttivo</text:p>
      <text:p text:style-name="Standard">Il Consiglio Direttivo guida le attività della Fondazione, definendone gli indirizzi e sostenendo le iniziative promosse in collaborazione con le scuole e le realtà del territorio</text:p>
      <text:p text:style-name="Standard"/>
      <text:p text:style-name="Standard">Francesca Scarfi</text:p>
      <text:p text:style-name="Standard">Presidente</text:p>
      <text:p text:style-name="Standard"/>
      <text:p text:style-name="Standard">Marco Tallone</text:p>
      <text:p text:style-name="Standard">Vicepresidente</text:p>
      <text:p text:style-name="Standard"/>
      <text:p text:style-name="Standard">Francesco Testa</text:p>
      <text:p text:style-name="Standard">Rappresentante Comune di Bra</text:p>
      <text:p text:style-name="Standard"/>
      <text:p text:style-name="Standard"/>
      <text:p text:style-name="Standard">Jacopo Busso</text:p>
      <text:p text:style-name="Standard">Rappresentante ASCOM Bra</text:p>
      <text:p text:style-name="Standard"/>
      <text:p text:style-name="Standard">Antonella Busso</text:p>
      <text:p text:style-name="Standard">Rappresentate Polo Licei di Bra</text:p>
      <text:p text:style-name="Standard"/>
      <text:p text:style-name="Standard">Silvia Mascarello</text:p>
      <text:p text:style-name="Standard">Rappresentante Finanziatori</text:p>
      <text:p text:style-name="Standard"/>
      <text:p text:style-name="Standard">Andrea Marengo</text:p>
      <text:p text:style-name="Standard">Rappresentante Legale </text:p>
      <text:p text:style-name="Standard"/>
      <text:p text:style-name="Standard">Famiglia Russo</text:p>
      <text:p text:style-name="Standard">Fondatrice</text:p>
      <text:p text:style-name="Standard"/>
      <text:p text:style-name="Standard">-----</text:p>
      <text:p text:style-name="Standard"/>
      <text:p text:style-name="Standard">La Fondazione crede nel valore della collaborazione tra scuola, istituzioni, cultura e territorio. Per questo promuove un modello di governance partecipato, orientato al dialogo e alla condivisione di competenze, esperienze e visioni educative capaci di generare opportunità concrete per le nuove generazioni.</text:p>
      <text:p text:style-name="Standard"/>
      <text:p text:style-name="Standard">- Organigramma</text:p>
      <text:p text:style-name="Standard"><text:soft-page-break/>&gt; Download Bilancio Sociale</text:p>
      <text:p text:style-name="Standard">&gt; Download Bilancio Patrimoniale</text:p>
      <text:p text:style-name="Standard"/>
      <text:p text:style-name="Standard">-----</text:p>
      <text:p text:style-name="Standard"/>
      <text:p text:style-name="Standard">Sostieni la Fondazione</text:p>
      <text:p text:style-name="Standard">Ogni contributo aiuta a trasformare idee e talenti in esperienze formative capaci di lasciare un segno nelle nuove generazioni.</text:p>
      <text:p text:style-name="Standard">&gt; Sostie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MODALITà D'INTERVENTO</text:p>
      <text:p text:style-name="Standard">---------------------------------------------------------------------------------------------------</text:p>
      <text:p text:style-name="Standard"/>
      <text:p text:style-name="Standard">La Fondazione Testa-Russo BRA INNOVA promuove e sostiene progetti educativi dedicati agli studenti delle scuole secondarie superiori cittadine, con l’obiettivo di favorire nuove modalità di apprendimento, partecipazione e crescita delle competenze.</text:p>
      <text:p text:style-name="Standard"/>
      <text:p text:style-name="Standard">Attraverso bandi annuali e collaborazioni con gli istituti scolastici, la Fondazione supporta iniziative capaci di valorizzare creatività, lavoro di gruppo, spirito di iniziativa e dialogo con il territorio, nel segno di una scuola aperta, dinamica e orientata all’innovazione. </text:p>
      <text:p text:style-name="Standard"/>
      <text:p text:style-name="Standard">-----</text:p>
      <text:p text:style-name="Standard"/>
      <text:p text:style-name="Standard">L’avvio delle attività 2025 / 2026</text:p>
      <text:p text:style-name="Standard"/>
      <text:p text:style-name="Standard">Con l’avvio delle proprie attività operative, la Fondazione ha presentato il primo bando annuale rivolto alle scuole secondarie superiori cittadine, con l’intento di sostenere progetti didattici innovativi sviluppati da studenti e docenti.Il percorso nasce dalla volontà di creare occasioni concrete di partecipazione e sperimentazione educativa, promuovendo esperienze capaci di unire apprendimento cooperativo, approccio laboratoriale e valorizzazione delle attitudini individuali.</text:p>
      <text:p text:style-name="Standard"/>
      <text:p text:style-name="Standard">&gt; Download Lettera ai Dirigenti</text:p>
      <text:p text:style-name="Standard"/>
      <text:p text:style-name="Standard">-----</text:p>
      <text:p text:style-name="Standard"/>
      <text:p text:style-name="Standard">Il bando annuale</text:p>
      <text:p text:style-name="Standard"/>
      <text:p text:style-name="Standard">Il bando della Fondazione è rivolto a gruppi di studenti, guidati da un docente responsabile, che intendano sviluppare progetti caratterizzati da un approccio laboratoriale e orientati alla crescita delle competenze degli studenti.Le iniziative possono riguardare attività culturali, educative, sociali e produttive del territorio, promuovendo apprendimento cooperativo, scambio di esperienze, autovalutazione e partecipazione attiva degli studenti.</text:p>
      <text:p text:style-name="Standard"/>
      <text:p text:style-name="Standard">&gt; Download Testo Bando</text:p>
      <text:p text:style-name="Standard"/>
      <text:p text:style-name="Standard">-----</text:p>
      <text:p text:style-name="Standard"/>
      <text:p text:style-name="Standard">Selezione e sostegno dei progetti</text:p>
      <text:p text:style-name="Standard">I progetti vengono selezionati attraverso un percorso di valutazione condiviso con gli istituti scolastici coinvolti.Il Consiglio Direttivo della Fondazione esamina le proposte ricevute e individua le iniziative ritenute maggiormente coerenti con le finalità educative e culturali della Fondazione.I progetti selezionati ricevono un sostegno economico finalizzato alla realizzazione delle attività e alla valorizzazione dell’impegno degli studenti coinvolti.</text:p>
      <text:p text:style-name="Standard"/>
      <text:p text:style-name="Standard">-----</text:p>
      <text:p text:style-name="Standard"/>
      <text:p text:style-name="Standard">Download</text:p>
      <text:p text:style-name="Standard"/>
      <text:p text:style-name="Standard">&gt; Scheda di presentazione progetto Ex Ante</text:p>
      <text:p text:style-name="Standard">&gt; Scarica schede rendicontazione ExPost </text:p>
      <text:p text:style-name="Standard">&gt; Documentazione Informativa e modulistica</text:p>
      <text:p text:style-name="Standard"><text:soft-page-break/></text:p>
      <text:p text:style-name="Standard">-----</text:p>
      <text:p text:style-name="Standard"/>
      <text:p text:style-name="Standard">Sostieni la Fondazione</text:p>
      <text:p text:style-name="Standard">Ogni contributo aiuta a trasformare idee e talenti in esperienze formative capaci di lasciare un segno nelle nuove generazioni.</text:p>
      <text:p text:style-name="Standard">&gt; Sostie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OSTIENI</text:p>
      <text:p text:style-name="Standard">---------------------------------------------------------------------------------------------------</text:p>
      <text:p text:style-name="Standard"/>
      <text:p text:style-name="Standard">Sostenere la Fondazione Testa-Russo BRA INNOVA significa partecipare concretamente alla realizzazione di progetti educativi, culturali e formativi dedicati agli studenti delle scuole secondarie superiori della città di Bra.</text:p>
      <text:p text:style-name="Standard"/>
      <text:p text:style-name="Standard">La famiglia Russo ha promosso la nascita della Fondazione in ricordo di Margherita Testa Russo, sostenendo le attività necessarie alla sua costituzione e al suo avvio operativo.</text:p>
      <text:p text:style-name="Standard">Per continuare a sviluppare le proprie attività e sostenere nuovi progetti dedicati ai giovani, la Fondazione necessita del contributo di cittadini, aziende e realtà del territorio che condividano i suoi valori educativi, culturali e sociali.</text:p>
      <text:p text:style-name="Standard"/>
      <text:p text:style-name="Standard">-----</text:p>
      <text:p text:style-name="Standard"/>
      <text:p text:style-name="Standard">Donazione del 5x1000</text:p>
      <text:p text:style-name="Standard">È possibile destinare il proprio 5x1000 alla Fondazione nella dichiarazione dei redditi, nel riquadro dedicato al “Sostegno agli Enti del Terzo Settore iscritti al RUNTS”, inserendo il codice fiscale:</text:p>
      <text:p text:style-name="Standard"/>
      <text:p text:style-name="Standard">C.F. 90065920044 &gt;copia</text:p>
      <text:p text:style-name="Standard"/>
      <text:p text:style-name="Standard">------</text:p>
      <text:p text:style-name="Standard"/>
      <text:p text:style-name="Standard">Donazione libera</text:p>
      <text:p text:style-name="Standard"/>
      <text:p text:style-name="Standard">Puoi sostenere la Fondazione attraverso un bonifico bancario intestato a:Fondazione Testa-Russo BRA INNOVA nella Scuola Secondaria Superiore – ETS</text:p>
      <text:p text:style-name="Standard"/>
      <text:p text:style-name="Standard">IBAN</text:p>
      <text:p text:style-name="Standard">IT55J0538746040000004663522 &gt;copia</text:p>
      <text:p text:style-name="Standard"/>
      <text:p text:style-name="Standard">-----</text:p>
      <text:p text:style-name="Standard"/>
      <text:p text:style-name="Standard">Agevolazioni fiscali</text:p>
      <text:p text:style-name="Standard">Le donazioni effettuate alla Fondazione possono beneficiare delle agevolazioni fiscali previste dalla normativa vigente per gli Enti del Terzo Settore.Le persone fisiche possono detrarre il 30% della donazione nella dichiarazione dei redditi.Le aziende possono dedurre la donazione nei limiti previsti dalla legge.-----</text:p>
      <text:p text:style-name="Standard"/>
      <text:p text:style-name="Standard">Trasparenza e responsabiltà</text:p>
      <text:p text:style-name="Standard"/>
      <text:p text:style-name="Standard">La Fondazione si impegna a garantire la massima trasparenza nell’utilizzo delle risorse ricevute, documentando le attività sostenute, i progetti finanziati e i risultati raggiunti nel tempo.Ogni contributo rappresenta un investimento concreto nella crescita culturale, educativa e sociale delle nuove generazioni e del territorio.</text:p>
      <text:p text:style-name="Standard"/>
      <text:p text:style-name="Standard">-----</text:p>
      <text:p text:style-name="Standard"/>
      <text:p text:style-name="Standard">Download</text:p>
      <text:p text:style-name="Standard"/>
      <text:p text:style-name="P1">&gt; Bilancio Sociale e Patrimoniale</text:p>
      <text:p text:style-name="P1"><text:soft-page-break/>&gt; Informazioni per il 5x1000</text:p>
      <text:p text:style-name="P1">&gt; Coordinate bancarie e modalità di donazione</text:p>
      <text:p text:style-name="P1">&gt; Documentazione fiscale e informativa</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5-12T16:56:13.231035979</meta:creation-date>
    <dc:date>2026-05-12T16:59:00.096208877</dc:date>
    <meta:editing-duration>PT2M47S</meta:editing-duration>
    <meta:editing-cycles>1</meta:editing-cycles>
    <meta:document-statistic meta:table-count="0" meta:image-count="0" meta:object-count="0" meta:page-count="12" meta:paragraph-count="166" meta:word-count="2033" meta:character-count="15857" meta:non-whitespace-character-count="13949"/>
    <meta:generator>LibreOffice/7.0.5.2$MacOSX_X86_64 LibreOffice_project/64390860c6cd0aca4beafafcfd84613dd9dfb63a</meta:generator>
  </office:meta>
</office:document-meta>
</file>